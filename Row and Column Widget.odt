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ff7b72" loext:opacity="100%" style:font-name="Droid Sans Mono" fo:font-size="10.5pt" fo:font-weight="normal" officeooo:rsid="0014a486" officeooo:paragraph-rsid="0014a486" fo:background-color="#121314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ff7b72" loext:opacity="100%" style:font-name="Droid Sans Mono" fo:font-size="10.5pt" fo:font-weight="normal" fo:background-color="#121314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Droid Sans Mono" fo:font-size="10.5pt" fo:font-weight="normal" fo:background-color="#121314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color="#bbbebf" loext:opacity="100%" style:font-name="Droid Sans Mono" fo:font-size="10.5pt" fo:font-weight="normal" fo:background-color="#121314"/>
    </style:style>
    <style:style style:name="T1" style:family="text">
      <style:text-properties fo:color="#ff7b72" loext:opacity="100%"/>
    </style:style>
    <style:style style:name="T2" style:family="text">
      <style:text-properties fo:color="#a5d6ff" loext:opacity="100%"/>
    </style:style>
    <style:style style:name="T3" style:family="text">
      <style:text-properties fo:color="#d2a8ff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ffa657" loext:opacity="100%"/>
    </style:style>
    <style:style style:name="T6" style:family="text">
      <style:text-properties fo:color="#c9d1d9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79c0ff" loext:opacity="100%"/>
    </style:style>
    <style:style style:name="T10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w Widget:</text:p>
      <text:p text:style-name="P2"/>
      <text:p text:style-name="P3"><text:span text:style-name="T1">import</text:span> <text:span text:style-name="T2">'package:flutter/material.dart'</text:span>;</text:p>
      <text:p text:style-name="P4"/>
      <text:p text:style-name="P3"><text:span text:style-name="T1">void</text:span> <text:span text:style-name="T3">main</text:span>() {</text:p>
      <text:p text:style-name="P3"><text:span text:style-name="T3">runApp</text:span>(<text:span text:style-name="T4">MyApp</text:span>());</text:p>
      <text:p text:style-name="P3">}</text:p>
      <text:p text:style-name="P4"/>
      <text:p text:style-name="P3"><text:span text:style-name="T1">class</text:span> <text:span text:style-name="T4">MyApp</text:span> <text:span text:style-name="T1">extends</text:span> <text:span text:style-name="T4">StatelessWidget</text:span> {</text:p>
      <text:p text:style-name="P3"><text:span text:style-name="T5">@</text:span><text:span text:style-name="T6">override</text:span></text:p>
      <text:p text:style-name="P3"><text:span text:style-name="T4">Widget</text:span> <text:span text:style-name="T3">build</text:span>(<text:span text:style-name="T4">BuildContext</text:span> <text:span text:style-name="T5">context</text:span>) {</text:p>
      <text:p text:style-name="P3"><text:span text:style-name="T7">return</text:span> <text:span text:style-name="T4">MaterialApp</text:span>(</text:p>
      <text:p text:style-name="P3"><text:span text:style-name="T5">home</text:span><text:span text:style-name="T8">:</text:span> <text:span text:style-name="T4">MyHomePage</text:span>(),</text:p>
      <text:p text:style-name="P3">);</text:p>
      <text:p text:style-name="P3">}</text:p>
      <text:p text:style-name="P3">}</text:p>
      <text:p text:style-name="P4"/>
      <text:p text:style-name="P3"><text:span text:style-name="T1">class</text:span> <text:span text:style-name="T4">MyHomePage</text:span> <text:span text:style-name="T1">extends</text:span> <text:span text:style-name="T4">StatelessWidget</text:span> {</text:p>
      <text:p text:style-name="P3"><text:span text:style-name="T5">@</text:span><text:span text:style-name="T6">override</text:span></text:p>
      <text:p text:style-name="P3"><text:span text:style-name="T4">Widget</text:span> <text:span text:style-name="T3">build</text:span>(<text:span text:style-name="T4">BuildContext</text:span> <text:span text:style-name="T5">context</text:span>) {</text:p>
      <text:p text:style-name="P3"><text:span text:style-name="T7">return</text:span> <text:span text:style-name="T4">Scaffold</text:span>(</text:p>
      <text:p text:style-name="P3"><text:span text:style-name="T5">appBar</text:span><text:span text:style-name="T8">:</text:span> <text:span text:style-name="T4">AppBar</text:span>(</text:p>
      <text:p text:style-name="P3"><text:span text:style-name="T5">title</text:span><text:span text:style-name="T8">:</text:span> <text:span text:style-name="T4">Text</text:span>(<text:span text:style-name="T2">"Flutter Row Example"</text:span>),</text:p>
      <text:p text:style-name="P3">),</text:p>
      <text:p text:style-name="P3"><text:span text:style-name="T5">body</text:span><text:span text:style-name="T8">:</text:span> <text:span text:style-name="T4">Row</text:span>(</text:p>
      <text:p text:style-name="P3"><text:span text:style-name="T5">mainAxisAlignment</text:span><text:span text:style-name="T8">:</text:span> <text:span text:style-name="T4">MainAxisAlignment</text:span>.<text:span text:style-name="T9">spaceEvenly</text:span>,</text:p>
      <text:p text:style-name="P3"><text:span text:style-name="T5">children</text:span><text:span text:style-name="T8">:</text:span> <text:span text:style-name="T8">&lt;</text:span><text:span text:style-name="T4">Widget</text:span><text:span text:style-name="T8">&gt;</text:span>[</text:p>
      <text:p text:style-name="P3"><text:span text:style-name="T4">Container</text:span>(</text:p>
      <text:p text:style-name="P3"><text:span text:style-name="T5">margin</text:span><text:span text:style-name="T8">:</text:span> <text:span text:style-name="T4">EdgeInsets</text:span>.<text:span text:style-name="T3">all</text:span>(<text:span text:style-name="T10">12.0</text:span>),</text:p>
      <text:p text:style-name="P3"><text:span text:style-name="T5">padding</text:span><text:span text:style-name="T8">:</text:span> <text:span text:style-name="T4">EdgeInsets</text:span>.<text:span text:style-name="T3">all</text:span>(<text:span text:style-name="T10">8.0</text:span>),</text:p>
      <text:p text:style-name="P3"><text:span text:style-name="T5">decoration</text:span><text:span text:style-name="T8">:</text:span> <text:span text:style-name="T4">BoxDecoration</text:span>(</text:p>
      <text:p text:style-name="P3"><text:span text:style-name="T5">borderRadius</text:span><text:span text:style-name="T8">:</text:span> <text:span text:style-name="T4">BorderRadius</text:span>.<text:span text:style-name="T3">circular</text:span>(<text:span text:style-name="T10">8</text:span>),</text:p>
      <text:p text:style-name="P3"><text:span text:style-name="T5">color</text:span><text:span text:style-name="T8">:</text:span> <text:span text:style-name="T4">Colors</text:span>.<text:span text:style-name="T6">green</text:span>,</text:p>
      <text:p text:style-name="P3">),</text:p>
      <text:p text:style-name="P3"><text:span text:style-name="T5">child</text:span><text:span text:style-name="T8">:</text:span> <text:span text:style-name="T4">Text</text:span>(</text:p>
      <text:p text:style-name="P3"><text:span text:style-name="T2">"React.js"</text:span>,</text:p>
      <text:p text:style-name="P3"><text:span text:style-name="T5">style</text:span><text:span text:style-name="T8">:</text:span> <text:span text:style-name="T4">TextStyle</text:span>(</text:p>
      <text:p text:style-name="P3"><text:span text:style-name="T5">color</text:span><text:span text:style-name="T8">:</text:span> <text:span text:style-name="T4">Colors</text:span>.<text:span text:style-name="T6">brown</text:span>,</text:p>
      <text:p text:style-name="P3"><text:span text:style-name="T5">fontSize</text:span><text:span text:style-name="T8">:</text:span> <text:span text:style-name="T10">25</text:span>,</text:p>
      <text:p text:style-name="P3">),</text:p>
      <text:p text:style-name="P3">),</text:p>
      <text:p text:style-name="P3">),</text:p>
      <text:p text:style-name="P3"><text:span text:style-name="T4">Container</text:span>(</text:p>
      <text:p text:style-name="P3"><text:span text:style-name="T5">margin</text:span><text:span text:style-name="T8">:</text:span> <text:span text:style-name="T4">EdgeInsets</text:span>.<text:span text:style-name="T3">all</text:span>(<text:span text:style-name="T10">15.0</text:span>),</text:p>
      <text:p text:style-name="P3"><text:span text:style-name="T5">padding</text:span><text:span text:style-name="T8">:</text:span> <text:span text:style-name="T4">EdgeInsets</text:span>.<text:span text:style-name="T3">all</text:span>(<text:span text:style-name="T10">8.0</text:span>),</text:p>
      <text:p text:style-name="P3"><text:span text:style-name="T5">decoration</text:span><text:span text:style-name="T8">:</text:span> <text:span text:style-name="T4">BoxDecoration</text:span>(</text:p>
      <text:p text:style-name="P3"><text:span text:style-name="T5">borderRadius</text:span><text:span text:style-name="T8">:</text:span> <text:span text:style-name="T4">BorderRadius</text:span>.<text:span text:style-name="T3">circular</text:span>(<text:span text:style-name="T10">8</text:span>),</text:p>
      <text:p text:style-name="P3"><text:span text:style-name="T5">color</text:span><text:span text:style-name="T8">:</text:span> <text:span text:style-name="T4">Colors</text:span>.<text:span text:style-name="T6">green</text:span>,</text:p>
      <text:p text:style-name="P3">),</text:p>
      <text:p text:style-name="P3"><text:span text:style-name="T5">child</text:span><text:span text:style-name="T8">:</text:span> <text:span text:style-name="T4">Text</text:span>(</text:p>
      <text:p text:style-name="P3"><text:soft-page-break/><text:span text:style-name="T2">"Angular"</text:span>,</text:p>
      <text:p text:style-name="P3"><text:span text:style-name="T5">style</text:span><text:span text:style-name="T8">:</text:span> <text:span text:style-name="T4">TextStyle</text:span>(</text:p>
      <text:p text:style-name="P3"><text:span text:style-name="T5">color</text:span><text:span text:style-name="T8">:</text:span> <text:span text:style-name="T4">Colors</text:span>.<text:span text:style-name="T6">deepOrange</text:span>,</text:p>
      <text:p text:style-name="P3"><text:span text:style-name="T5">fontSize</text:span><text:span text:style-name="T8">:</text:span> <text:span text:style-name="T10">25</text:span>,</text:p>
      <text:p text:style-name="P3">),</text:p>
      <text:p text:style-name="P3">),</text:p>
      <text:p text:style-name="P3">),</text:p>
      <text:p text:style-name="P3"><text:span text:style-name="T4">Container</text:span>(</text:p>
      <text:p text:style-name="P3"><text:span text:style-name="T5">margin</text:span><text:span text:style-name="T8">:</text:span> <text:span text:style-name="T4">EdgeInsets</text:span>.<text:span text:style-name="T3">all</text:span>(<text:span text:style-name="T10">12.0</text:span>),</text:p>
      <text:p text:style-name="P3"><text:span text:style-name="T5">padding</text:span><text:span text:style-name="T8">:</text:span> <text:span text:style-name="T4">EdgeInsets</text:span>.<text:span text:style-name="T3">all</text:span>(<text:span text:style-name="T10">8.0</text:span>),</text:p>
      <text:p text:style-name="P3"><text:span text:style-name="T5">decoration</text:span><text:span text:style-name="T8">:</text:span> <text:span text:style-name="T4">BoxDecoration</text:span>(</text:p>
      <text:p text:style-name="P3"><text:span text:style-name="T5">borderRadius</text:span><text:span text:style-name="T8">:</text:span> <text:span text:style-name="T4">BorderRadius</text:span>.<text:span text:style-name="T3">circular</text:span>(<text:span text:style-name="T10">8</text:span>),</text:p>
      <text:p text:style-name="P3"><text:span text:style-name="T5">color</text:span><text:span text:style-name="T8">:</text:span> <text:span text:style-name="T4">Colors</text:span>.<text:span text:style-name="T6">green</text:span>,</text:p>
      <text:p text:style-name="P3">),</text:p>
      <text:p text:style-name="P3"><text:span text:style-name="T5">child</text:span><text:span text:style-name="T8">:</text:span> <text:span text:style-name="T4">Text</text:span>(</text:p>
      <text:p text:style-name="P3"><text:span text:style-name="T2">"Flutter"</text:span>,</text:p>
      <text:p text:style-name="P3"><text:span text:style-name="T5">style</text:span><text:span text:style-name="T8">:</text:span> <text:span text:style-name="T4">TextStyle</text:span>(</text:p>
      <text:p text:style-name="P3"><text:span text:style-name="T5">color</text:span><text:span text:style-name="T8">:</text:span> <text:span text:style-name="T4">Colors</text:span>.<text:span text:style-name="T6">indigo</text:span>,</text:p>
      <text:p text:style-name="P3"><text:span text:style-name="T5">fontSize</text:span><text:span text:style-name="T8">:</text:span> <text:span text:style-name="T10">25</text:span>,</text:p>
      <text:p text:style-name="P3">),</text:p>
      <text:p text:style-name="P3">),</text:p>
      <text:p text:style-name="P3">),</text:p>
      <text:p text:style-name="P3">],</text:p>
      <text:p text:style-name="P3">),</text:p>
      <text:p text:style-name="P3">);</text:p>
      <text:p text:style-name="P3">}</text:p>
      <text:p text:style-name="P3">}</text:p>
      <text:p text:style-name="P5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lumn Widget:</text:p>
      <text:p text:style-name="P2"/>
      <text:p text:style-name="P2"/>
      <text:p text:style-name="P3"><text:span text:style-name="T1">import</text:span> <text:span text:style-name="T2">'package:flutter/material.dart'</text:span>;</text:p>
      <text:p text:style-name="P4"/>
      <text:p text:style-name="P3"><text:span text:style-name="T1">void</text:span> <text:span text:style-name="T3">main</text:span>() {</text:p>
      <text:p text:style-name="P3"><text:span text:style-name="T3">runApp</text:span>(<text:span text:style-name="T4">MyApp</text:span>());</text:p>
      <text:p text:style-name="P3">}</text:p>
      <text:p text:style-name="P4"/>
      <text:p text:style-name="P3"><text:span text:style-name="T1">class</text:span> <text:span text:style-name="T4">MyApp</text:span> <text:span text:style-name="T1">extends</text:span> <text:span text:style-name="T4">StatelessWidget</text:span> {</text:p>
      <text:p text:style-name="P3"><text:span text:style-name="T5">@</text:span><text:span text:style-name="T6">override</text:span></text:p>
      <text:p text:style-name="P3"><text:span text:style-name="T4">Widget</text:span> <text:span text:style-name="T3">build</text:span>(<text:span text:style-name="T4">BuildContext</text:span> <text:span text:style-name="T5">context</text:span>) {</text:p>
      <text:p text:style-name="P3"><text:span text:style-name="T7">return</text:span> <text:span text:style-name="T4">MaterialApp</text:span>(</text:p>
      <text:p text:style-name="P3"><text:span text:style-name="T5">home</text:span><text:span text:style-name="T8">:</text:span> <text:span text:style-name="T4">MyHomePage</text:span>(),</text:p>
      <text:p text:style-name="P3">);</text:p>
      <text:p text:style-name="P3">}</text:p>
      <text:p text:style-name="P3">}</text:p>
      <text:p text:style-name="P4"/>
      <text:p text:style-name="P3"><text:span text:style-name="T1">class</text:span> <text:span text:style-name="T4">MyHomePage</text:span> <text:span text:style-name="T1">extends</text:span> <text:span text:style-name="T4">StatelessWidget</text:span> {</text:p>
      <text:p text:style-name="P3"><text:span text:style-name="T5">@</text:span><text:span text:style-name="T6">override</text:span></text:p>
      <text:p text:style-name="P3"><text:span text:style-name="T4">Widget</text:span> <text:span text:style-name="T3">build</text:span>(<text:span text:style-name="T4">BuildContext</text:span> <text:span text:style-name="T5">context</text:span>) {</text:p>
      <text:p text:style-name="P3"><text:span text:style-name="T7">return</text:span> <text:span text:style-name="T4">Scaffold</text:span>(</text:p>
      <text:p text:style-name="P3"><text:span text:style-name="T5">appBar</text:span><text:span text:style-name="T8">:</text:span> <text:span text:style-name="T4">AppBar</text:span>(</text:p>
      <text:p text:style-name="P3"><text:span text:style-name="T5">title</text:span><text:span text:style-name="T8">:</text:span> <text:span text:style-name="T4">Text</text:span>(<text:span text:style-name="T2">"Flutter Row Example"</text:span>),</text:p>
      <text:p text:style-name="P3">),</text:p>
      <text:p text:style-name="P3"><text:span text:style-name="T5">body</text:span><text:span text:style-name="T8">:</text:span> <text:span text:style-name="T4">Column</text:span>(</text:p>
      <text:p text:style-name="P3"><text:span text:style-name="T5">mainAxisAlignment</text:span><text:span text:style-name="T8">:</text:span> <text:span text:style-name="T4">MainAxisAlignment</text:span>.<text:span text:style-name="T9">spaceEvenly</text:span>,</text:p>
      <text:p text:style-name="P3"><text:span text:style-name="T5">children</text:span><text:span text:style-name="T8">:</text:span> <text:span text:style-name="T8">&lt;</text:span><text:span text:style-name="T4">Widget</text:span><text:span text:style-name="T8">&gt;</text:span>[</text:p>
      <text:p text:style-name="P3"><text:span text:style-name="T4">Container</text:span>(</text:p>
      <text:p text:style-name="P3"><text:span text:style-name="T5">margin</text:span><text:span text:style-name="T8">:</text:span> <text:span text:style-name="T4">EdgeInsets</text:span>.<text:span text:style-name="T3">all</text:span>(<text:span text:style-name="T10">12.0</text:span>),</text:p>
      <text:p text:style-name="P3"><text:span text:style-name="T5">padding</text:span><text:span text:style-name="T8">:</text:span> <text:span text:style-name="T4">EdgeInsets</text:span>.<text:span text:style-name="T3">all</text:span>(<text:span text:style-name="T10">8.0</text:span>),</text:p>
      <text:p text:style-name="P3"><text:span text:style-name="T5">decoration</text:span><text:span text:style-name="T8">:</text:span> <text:span text:style-name="T4">BoxDecoration</text:span>(</text:p>
      <text:p text:style-name="P3"><text:span text:style-name="T5">borderRadius</text:span><text:span text:style-name="T8">:</text:span> <text:span text:style-name="T4">BorderRadius</text:span>.<text:span text:style-name="T3">circular</text:span>(<text:span text:style-name="T10">8</text:span>),</text:p>
      <text:p text:style-name="P3"><text:span text:style-name="T5">color</text:span><text:span text:style-name="T8">:</text:span> <text:span text:style-name="T4">Colors</text:span>.<text:span text:style-name="T6">green</text:span>,</text:p>
      <text:p text:style-name="P3">),</text:p>
      <text:p text:style-name="P3"><text:span text:style-name="T5">child</text:span><text:span text:style-name="T8">:</text:span> <text:span text:style-name="T4">Text</text:span>(</text:p>
      <text:p text:style-name="P3"><text:span text:style-name="T2">"React.js"</text:span>,</text:p>
      <text:p text:style-name="P3"><text:span text:style-name="T5">style</text:span><text:span text:style-name="T8">:</text:span> <text:span text:style-name="T4">TextStyle</text:span>(</text:p>
      <text:p text:style-name="P3"><text:span text:style-name="T5">color</text:span><text:span text:style-name="T8">:</text:span> <text:span text:style-name="T4">Colors</text:span>.<text:span text:style-name="T6">brown</text:span>,</text:p>
      <text:p text:style-name="P3"><text:span text:style-name="T5">fontSize</text:span><text:span text:style-name="T8">:</text:span> <text:span text:style-name="T10">25</text:span>,</text:p>
      <text:p text:style-name="P3">),</text:p>
      <text:p text:style-name="P3">),</text:p>
      <text:p text:style-name="P3">),</text:p>
      <text:p text:style-name="P3"><text:span text:style-name="T4">Container</text:span>(</text:p>
      <text:p text:style-name="P3"><text:span text:style-name="T5">margin</text:span><text:span text:style-name="T8">:</text:span> <text:span text:style-name="T4">EdgeInsets</text:span>.<text:span text:style-name="T3">all</text:span>(<text:span text:style-name="T10">15.0</text:span>),</text:p>
      <text:p text:style-name="P3"><text:span text:style-name="T5">padding</text:span><text:span text:style-name="T8">:</text:span> <text:span text:style-name="T4">EdgeInsets</text:span>.<text:span text:style-name="T3">all</text:span>(<text:span text:style-name="T10">8.0</text:span>),</text:p>
      <text:p text:style-name="P3"><text:span text:style-name="T5">decoration</text:span><text:span text:style-name="T8">:</text:span> <text:span text:style-name="T4">BoxDecoration</text:span>(</text:p>
      <text:p text:style-name="P3"><text:span text:style-name="T5">borderRadius</text:span><text:span text:style-name="T8">:</text:span> <text:span text:style-name="T4">BorderRadius</text:span>.<text:span text:style-name="T3">circular</text:span>(<text:span text:style-name="T10">8</text:span>),</text:p>
      <text:p text:style-name="P3"><text:span text:style-name="T5">color</text:span><text:span text:style-name="T8">:</text:span> <text:span text:style-name="T4">Colors</text:span>.<text:span text:style-name="T6">green</text:span>,</text:p>
      <text:p text:style-name="P3">),</text:p>
      <text:p text:style-name="P3"><text:soft-page-break/><text:span text:style-name="T5">child</text:span><text:span text:style-name="T8">:</text:span> <text:span text:style-name="T4">Text</text:span>(</text:p>
      <text:p text:style-name="P3"><text:span text:style-name="T2">"Angular"</text:span>,</text:p>
      <text:p text:style-name="P3"><text:span text:style-name="T5">style</text:span><text:span text:style-name="T8">:</text:span> <text:span text:style-name="T4">TextStyle</text:span>(</text:p>
      <text:p text:style-name="P3"><text:span text:style-name="T5">color</text:span><text:span text:style-name="T8">:</text:span> <text:span text:style-name="T4">Colors</text:span>.<text:span text:style-name="T6">deepOrange</text:span>,</text:p>
      <text:p text:style-name="P3"><text:span text:style-name="T5">fontSize</text:span><text:span text:style-name="T8">:</text:span> <text:span text:style-name="T10">25</text:span>,</text:p>
      <text:p text:style-name="P3">),</text:p>
      <text:p text:style-name="P3">),</text:p>
      <text:p text:style-name="P3">),</text:p>
      <text:p text:style-name="P3"><text:span text:style-name="T4">Container</text:span>(</text:p>
      <text:p text:style-name="P3"><text:span text:style-name="T5">margin</text:span><text:span text:style-name="T8">:</text:span> <text:span text:style-name="T4">EdgeInsets</text:span>.<text:span text:style-name="T3">all</text:span>(<text:span text:style-name="T10">12.0</text:span>),</text:p>
      <text:p text:style-name="P3"><text:span text:style-name="T5">padding</text:span><text:span text:style-name="T8">:</text:span> <text:span text:style-name="T4">EdgeInsets</text:span>.<text:span text:style-name="T3">all</text:span>(<text:span text:style-name="T10">8.0</text:span>),</text:p>
      <text:p text:style-name="P3"><text:span text:style-name="T5">decoration</text:span><text:span text:style-name="T8">:</text:span> <text:span text:style-name="T4">BoxDecoration</text:span>(</text:p>
      <text:p text:style-name="P3"><text:span text:style-name="T5">borderRadius</text:span><text:span text:style-name="T8">:</text:span> <text:span text:style-name="T4">BorderRadius</text:span>.<text:span text:style-name="T3">circular</text:span>(<text:span text:style-name="T10">8</text:span>),</text:p>
      <text:p text:style-name="P3"><text:span text:style-name="T5">color</text:span><text:span text:style-name="T8">:</text:span> <text:span text:style-name="T4">Colors</text:span>.<text:span text:style-name="T6">green</text:span>,</text:p>
      <text:p text:style-name="P3">),</text:p>
      <text:p text:style-name="P3"><text:span text:style-name="T5">child</text:span><text:span text:style-name="T8">:</text:span> <text:span text:style-name="T4">Text</text:span>(</text:p>
      <text:p text:style-name="P3"><text:span text:style-name="T2">"Flutter"</text:span>,</text:p>
      <text:p text:style-name="P3"><text:span text:style-name="T5">style</text:span><text:span text:style-name="T8">:</text:span> <text:span text:style-name="T4">TextStyle</text:span>(</text:p>
      <text:p text:style-name="P3"><text:span text:style-name="T5">color</text:span><text:span text:style-name="T8">:</text:span> <text:span text:style-name="T4">Colors</text:span>.<text:span text:style-name="T6">indigo</text:span>,</text:p>
      <text:p text:style-name="P3"><text:span text:style-name="T5">fontSize</text:span><text:span text:style-name="T8">:</text:span> <text:span text:style-name="T10">25</text:span>,</text:p>
      <text:p text:style-name="P3">),</text:p>
      <text:p text:style-name="P3">),</text:p>
      <text:p text:style-name="P3">),</text:p>
      <text:p text:style-name="P3">],</text:p>
      <text:p text:style-name="P3">),</text:p>
      <text:p text:style-name="P3">);</text:p>
      <text:p text:style-name="P3">}</text:p>
      <text:p text:style-name="P3">}</text:p>
      <text:p text:style-name="P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3T10:09:20.969093776</meta:creation-date>
    <dc:date>2026-07-13T10:11:09.097281170</dc:date>
    <meta:editing-duration>PT1M48S</meta:editing-duration>
    <meta:editing-cycles>1</meta:editing-cycles>
    <meta:document-statistic meta:table-count="0" meta:image-count="0" meta:object-count="0" meta:page-count="4" meta:paragraph-count="146" meta:word-count="256" meta:character-count="2308" meta:non-whitespace-character-count="2198"/>
    <meta:generator>LibreOffice/26.2.4.2$Linux_X86_64 LibreOffice_project/3346a99e6b841765b75a9b29714a5b95c6761ce3</meta:generator>
  </office:meta>
</office:document-meta>
</file>